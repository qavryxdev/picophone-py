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table="urn:oasis:names:tc:opendocument:xmlns:table:1.0" xmlns:manifest="urn:oasis:names:tc:opendocument:xmlns:manifest:1.0" office:version="1.2">
  <office:font-face-decls>
    <style:font-face style:name="Sans" svg:font-family="Liberation Sans"/>
    <style:font-face style:name="Mono" svg:font-family="Liberation Mono" style:font-pitch="fixed"/>
  </office:font-face-decls>
  <office:automatic-styles>
    <style:style style:name="Tbl" style:family="table" style:display-name="Tbl">
      <style:table-properties style:width="17cm" table:align="margins"/>
    </style:style>
    <style:style style:name="TCellH" style:family="table-cell" style:display-name="TCellH">
      <style:table-cell-properties fo:background-color="#dde4f0" fo:padding="0.1cm" fo:border="0.05pt solid #888"/>
    </style:style>
    <style:style style:name="TCellB" style:family="table-cell" style:display-name="TCellB">
      <style:table-cell-properties fo:padding="0.1cm" fo:border="0.05pt solid #888"/>
    </style:style>
    <style:style style:name="col_3095877951296_10cm" style:family="table-column" style:display-name="col_3095877951296_10cm">
      <style:table-column-properties style:column-width="10cm"/>
    </style:style>
    <style:style style:name="col_3095877951296_7cm" style:family="table-column" style:display-name="col_3095877951296_7cm">
      <style:table-column-properties style:column-width="7cm"/>
    </style:style>
    <style:style style:name="col_3095878143680_2.5cm" style:family="table-column" style:display-name="col_3095878143680_2.5cm">
      <style:table-column-properties style:column-width="2.5cm"/>
    </style:style>
    <style:style style:name="col_3095878143680_3.5cm" style:family="table-column" style:display-name="col_3095878143680_3.5cm">
      <style:table-column-properties style:column-width="3.5cm"/>
    </style:style>
    <style:style style:name="col_3095878143680_2cm" style:family="table-column" style:display-name="col_3095878143680_2cm">
      <style:table-column-properties style:column-width="2cm"/>
    </style:style>
    <style:style style:name="col_3095878143680_9cm" style:family="table-column" style:display-name="col_3095878143680_9cm">
      <style:table-column-properties style:column-width="9cm"/>
    </style:style>
    <style:style style:name="col_3095878294832_3cm" style:family="table-column" style:display-name="col_3095878294832_3cm">
      <style:table-column-properties style:column-width="3cm"/>
    </style:style>
    <style:style style:name="col_3095878294832_4cm" style:family="table-column" style:display-name="col_3095878294832_4cm">
      <style:table-column-properties style:column-width="4cm"/>
    </style:style>
    <style:style style:name="col_3095878294832_10cm" style:family="table-column" style:display-name="col_3095878294832_10cm">
      <style:table-column-properties style:column-width="10cm"/>
    </style:style>
    <style:style style:name="col_3095878298288_2.5cm" style:family="table-column" style:display-name="col_3095878298288_2.5cm">
      <style:table-column-properties style:column-width="2.5cm"/>
    </style:style>
    <style:style style:name="col_3095878298288_4.5cm" style:family="table-column" style:display-name="col_3095878298288_4.5cm">
      <style:table-column-properties style:column-width="4.5cm"/>
    </style:style>
    <style:style style:name="col_3095878298288_10cm" style:family="table-column" style:display-name="col_3095878298288_10cm">
      <style:table-column-properties style:column-width="10cm"/>
    </style:style>
    <style:style style:name="col_3095878408944_6cm" style:family="table-column" style:display-name="col_3095878408944_6cm">
      <style:table-column-properties style:column-width="6cm"/>
    </style:style>
    <style:style style:name="col_3095878408944_11cm" style:family="table-column" style:display-name="col_3095878408944_11cm">
      <style:table-column-properties style:column-width="11cm"/>
    </style:style>
    <style:style style:name="col_3095875805520_1.8cm" style:family="table-column" style:display-name="col_3095875805520_1.8cm">
      <style:table-column-properties style:column-width="1.8cm"/>
    </style:style>
    <style:style style:name="col_3095875805520_2.2cm" style:family="table-column" style:display-name="col_3095875805520_2.2cm">
      <style:table-column-properties style:column-width="2.2cm"/>
    </style:style>
    <style:style style:name="col_3095875805520_13cm" style:family="table-column" style:display-name="col_3095875805520_13cm">
      <style:table-column-properties style:column-width="13cm"/>
    </style:style>
  </office:automatic-styles>
  <office:body>
    <office:text>
      <text:p text:style-name="Title">PicoPhone-Py</text:p>
      <text:p text:style-name="CenterMuted">Modern multiplatform reimplementation of PicoPhone (Aldazabal, 2009) — generated 2026-04-28</text:p>
      <text:h text:outline-level="1" text:style-name="H1NoPB">1. About</text:h>
      <text:p text:style-name="Body">PicoPhone-Py is a single-file portable softphone for Windows and Linux. It revives the original PicoPhone 1.65 (Javier Aldazabal, 2009) on a modern stack: PySide6 GUI, Opus codec, AES-128-GCM encrypted media, IPv6 dual-stack signaling, mDNS-style LAN auto-discovery, and an optional DeepFilterNet3 neural noise / dereverb module on the AI-mode track.</text:p>
      <text:p text:style-name="Body">The Windows binary is a true onefile .exe; the Linux binary is a single ELF. Both unpack their bundled Python runtime and Qt libraries to a private temporary directory on launch and clean up on exit. No installer, no admin rights, no sibling DLLs.</text:p>
      <text:h text:outline-level="1" text:style-name="H1">2. Features</text:h>
      <table:table table:style-name="Tbl">
        <table:table-column table:style-name="col_3095877951296_10cm"/>
        <table:table-column table:style-name="col_3095877951296_7cm"/>
        <table:table-row>
          <table:table-cell table:style-name="TCellH">
            <text:p text:style-name="Body"><text:span text:style-name="Bold">Feature</text:span></text:p>
          </table:table-cell>
          <table:table-cell table:style-name="TCellH">
            <text:p text:style-name="Body"><text:span text:style-name="Bold">Status</text:span></text:p>
          </table:table-cell>
        </table:table-row>
        <table:table-row>
          <table:table-cell table:style-name="TCellB">
            <text:p text:style-name="Body">Opus 48 kHz mono media</text:p>
          </table:table-cell>
          <table:table-cell table:style-name="TCellB">
            <text:p text:style-name="Body">core</text:p>
          </table:table-cell>
        </table:table-row>
        <table:table-row>
          <table:table-cell table:style-name="TCellB">
            <text:p text:style-name="Body">AEC: FDAF + Wiener post-filter + Geigel DTD</text:p>
          </table:table-cell>
          <table:table-cell table:style-name="TCellB">
            <text:p text:style-name="Body">core</text:p>
          </table:table-cell>
        </table:table-row>
        <table:table-row>
          <table:table-cell table:style-name="TCellB">
            <text:p text:style-name="Body">AEC: DeepFilterNet3 (AI mode)</text:p>
          </table:table-cell>
          <table:table-cell table:style-name="TCellB">
            <text:p text:style-name="Body">optional</text:p>
          </table:table-cell>
        </table:table-row>
        <table:table-row>
          <table:table-cell table:style-name="TCellB">
            <text:p text:style-name="Body">AES-128-GCM media encryption</text:p>
          </table:table-cell>
          <table:table-cell table:style-name="TCellB">
            <text:p text:style-name="Body">core, HKDF per call</text:p>
          </table:table-cell>
        </table:table-row>
        <table:table-row>
          <table:table-cell table:style-name="TCellB">
            <text:p text:style-name="Body">IPv4 + IPv6 dual-stack signaling</text:p>
          </table:table-cell>
          <table:table-cell table:style-name="TCellB">
            <text:p text:style-name="Body">core</text:p>
          </table:table-cell>
        </table:table-row>
        <table:table-row>
          <table:table-cell table:style-name="TCellB">
            <text:p text:style-name="Body">mDNS-style LAN auto-discovery</text:p>
          </table:table-cell>
          <table:table-cell table:style-name="TCellB">
            <text:p text:style-name="Body">core, multicast UDP</text:p>
          </table:table-cell>
        </table:table-row>
        <table:table-row>
          <table:table-cell table:style-name="TCellB">
            <text:p text:style-name="Body">Single UDP port for signaling + media</text:p>
          </table:table-cell>
          <table:table-cell table:style-name="TCellB">
            <text:p text:style-name="Body">first-byte dispatch</text:p>
          </table:table-cell>
        </table:table-row>
        <table:table-row>
          <table:table-cell table:style-name="TCellB">
            <text:p text:style-name="Body">PING/PONG keepalive (caller and callee)</text:p>
          </table:table-cell>
          <table:table-cell table:style-name="TCellB">
            <text:p text:style-name="Body">core</text:p>
          </table:table-cell>
        </table:table-row>
        <table:table-row>
          <table:table-cell table:style-name="TCellB">
            <text:p text:style-name="Body">Ringtone (original ringin.wav)</text:p>
          </table:table-cell>
          <table:table-cell table:style-name="TCellB">
            <text:p text:style-name="Body">QSoundEffect, looped</text:p>
          </table:table-cell>
        </table:table-row>
        <table:table-row>
          <table:table-cell table:style-name="TCellB">
            <text:p text:style-name="Body">Pop-up dialogs for call events</text:p>
          </table:table-cell>
          <table:table-cell table:style-name="TCellB">
            <text:p text:style-name="Body">hung up / lost / no answer</text:p>
          </table:table-cell>
        </table:table-row>
        <table:table-row>
          <table:table-cell table:style-name="TCellB">
            <text:p text:style-name="Body">Single incoming-call dialog</text:p>
          </table:table-cell>
          <table:table-cell table:style-name="TCellB">
            <text:p text:style-name="Body">auto-rejects further INVITEs</text:p>
          </table:table-cell>
        </table:table-row>
        <table:table-row>
          <table:table-cell table:style-name="TCellB">
            <text:p text:style-name="Body">Mute mic / mute speaker (clickable LED)</text:p>
          </table:table-cell>
          <table:table-cell table:style-name="TCellB">
            <text:p text:style-name="Body">PicoPhone-style</text:p>
          </table:table-cell>
        </table:table-row>
        <table:table-row>
          <table:table-cell table:style-name="TCellB">
            <text:p text:style-name="Body">MIC / SPK gain sliders</text:p>
          </table:table-cell>
          <table:table-cell table:style-name="TCellB">
            <text:p text:style-name="Body">linear, 0..1.0</text:p>
          </table:table-cell>
        </table:table-row>
        <table:table-row>
          <table:table-cell table:style-name="TCellB">
            <text:p text:style-name="Body">Live TX/RX kbps in status bar</text:p>
          </table:table-cell>
          <table:table-cell table:style-name="TCellB">
            <text:p text:style-name="Body">diagnostic</text:p>
          </table:table-cell>
        </table:table-row>
        <table:table-row>
          <table:table-cell table:style-name="TCellB">
            <text:p text:style-name="Body">System-tray minimize</text:p>
          </table:table-cell>
          <table:table-cell table:style-name="TCellB">
            <text:p text:style-name="Body">Win/Linux</text:p>
          </table:table-cell>
        </table:table-row>
        <table:table-row>
          <table:table-cell table:style-name="TCellB">
            <text:p text:style-name="Body">Autostart with Windows</text:p>
          </table:table-cell>
          <table:table-cell table:style-name="TCellB">
            <text:p text:style-name="Body">registry HKCU\\...\\Run</text:p>
          </table:table-cell>
        </table:table-row>
        <table:table-row>
          <table:table-cell table:style-name="TCellB">
            <text:p text:style-name="Body">Optional log file</text:p>
          </table:table-cell>
          <table:table-cell table:style-name="TCellB">
            <text:p text:style-name="Body">off by default</text:p>
          </table:table-cell>
        </table:table-row>
      </table:table>
      <text:h text:outline-level="1" text:style-name="H1">3. Build</text:h>
      <text:h text:outline-level="2" text:style-name="H2">3.1 Windows</text:h>
      <text:p text:style-name="Body">Run from the project root:</text:p>
      <text:p text:style-name="Code">scripts\build_windows.bat</text:p>
      <text:p text:style-name="Body">Output: dist\nuitka\PicoPhone-Py.exe. Requires Python 3.12 + Nuitka with auto-MinGW64; DeepFilterNet bundling triggers automatically when the deepfilternet pip package is installed in that interpreter.</text:p>
      <text:h text:outline-level="2" text:style-name="H2">3.2 Linux (Mageia 9 / Fedora 39+ / RHEL 9+)</text:h>
      <text:p text:style-name="Body">On a real Mageia desktop:</text:p>
      <text:p text:style-name="Code">scripts/build_mageia.sh</text:p>
      <text:p text:style-name="Body">On any other host, use the WSL2-Mageia pipeline (bundled instructions in README.md). Output: dist/nuitka/PicoPhone-Py — single ELF, glibc 2.36 link target, runs on Mageia 9, Mageia 10/cauldron, Fedora 39+, RHEL 9+, Ubuntu 24.04+.</text:p>
      <text:h text:outline-level="2" text:style-name="H2">3.3 Slim torch list</text:h>
      <text:p text:style-name="Body">The DeepFilterNet bundle drags in PyTorch CPU. Without filtering, Nuitka tries to compile 2 700+ C modules (including 50 000-line torch.testing._internal.common_methods_invocations.c) and gcc OOMs.</text:p>
      <text:p text:style-name="Body">Both build scripts therefore pass --nofollow-import-to for subtrees we never reach during inference: torch.testing, torch.distributed, torch.fx/jit/onnx/optim/profiler, torch._inductor, torch._dynamo, torch.utils.{tensorboard,benchmark}, torch.nn.{qat,quantized,intrinsic}, torch.ao, torch.quantization, sympy, networkx. Module count drops to ~600, build wallclock to ~15 min on 24 cores.</text:p>
      <text:h text:outline-level="1" text:style-name="H1">4. Configuration</text:h>
      <text:p text:style-name="Body">Settings are stored in TOML at ~/.picophone/picophone.toml; the file is auto-migrated from the original PicoPhone.ini if found in the working dir. Most options are exposed in the in-app PREF dialog (Network / Audio / Security tabs).</text:p>
      <table:table table:style-name="Tbl">
        <table:table-column table:style-name="col_3095878143680_2.5cm"/>
        <table:table-column table:style-name="col_3095878143680_3.5cm"/>
        <table:table-column table:style-name="col_3095878143680_2cm"/>
        <table:table-column table:style-name="col_3095878143680_9cm"/>
        <table:table-row>
          <table:table-cell table:style-name="TCellH">
            <text:p text:style-name="Body"><text:span text:style-name="Bold">Section</text:span></text:p>
          </table:table-cell>
          <table:table-cell table:style-name="TCellH">
            <text:p text:style-name="Body"><text:span text:style-name="Bold">Key</text:span></text:p>
          </table:table-cell>
          <table:table-cell table:style-name="TCellH">
            <text:p text:style-name="Body"><text:span text:style-name="Bold">Default</text:span></text:p>
          </table:table-cell>
          <table:table-cell table:style-name="TCellH">
            <text:p text:style-name="Body"><text:span text:style-name="Bold">Notes</text:span></text:p>
          </table:table-cell>
        </table:table-row>
        <table:table-row>
          <table:table-cell table:style-name="TCellB">
            <text:p text:style-name="Body">[net]</text:p>
          </table:table-cell>
          <table:table-cell table:style-name="TCellB">
            <text:p text:style-name="Body">identity</text:p>
          </table:table-cell>
          <table:table-cell table:style-name="TCellB">
            <text:p text:style-name="Body">anon</text:p>
          </table:table-cell>
          <table:table-cell table:style-name="TCellB">
            <text:p text:style-name="Body">shown in title bar / chat / mDNS</text:p>
          </table:table-cell>
        </table:table-row>
        <table:table-row>
          <table:table-cell table:style-name="TCellB">
            <text:p text:style-name="Body">[net]</text:p>
          </table:table-cell>
          <table:table-cell table:style-name="TCellB">
            <text:p text:style-name="Body">port</text:p>
          </table:table-cell>
          <table:table-cell table:style-name="TCellB">
            <text:p text:style-name="Body">11676</text:p>
          </table:table-cell>
          <table:table-cell table:style-name="TCellB">
            <text:p text:style-name="Body">single UDP port — signaling + media</text:p>
          </table:table-cell>
        </table:table-row>
        <table:table-row>
          <table:table-cell table:style-name="TCellB">
            <text:p text:style-name="Body">[net]</text:p>
          </table:table-cell>
          <table:table-cell table:style-name="TCellB">
            <text:p text:style-name="Body">bind_v6</text:p>
          </table:table-cell>
          <table:table-cell table:style-name="TCellB">
            <text:p text:style-name="Body">true</text:p>
          </table:table-cell>
          <table:table-cell table:style-name="TCellB">
            <text:p text:style-name="Body">dual-stack v6 + v4-mapped</text:p>
          </table:table-cell>
        </table:table-row>
        <table:table-row>
          <table:table-cell table:style-name="TCellB">
            <text:p text:style-name="Body">[net]</text:p>
          </table:table-cell>
          <table:table-cell table:style-name="TCellB">
            <text:p text:style-name="Body">autoanswer</text:p>
          </table:table-cell>
          <table:table-cell table:style-name="TCellB">
            <text:p text:style-name="Body">false</text:p>
          </table:table-cell>
          <table:table-cell table:style-name="TCellB">
            <text:p text:style-name="Body">auto-accept incoming INVITE</text:p>
          </table:table-cell>
        </table:table-row>
        <table:table-row>
          <table:table-cell table:style-name="TCellB">
            <text:p text:style-name="Body">[net]</text:p>
          </table:table-cell>
          <table:table-cell table:style-name="TCellB">
            <text:p text:style-name="Body">mdns</text:p>
          </table:table-cell>
          <table:table-cell table:style-name="TCellB">
            <text:p text:style-name="Body">true</text:p>
          </table:table-cell>
          <table:table-cell table:style-name="TCellB">
            <text:p text:style-name="Body">LAN auto-discovery</text:p>
          </table:table-cell>
        </table:table-row>
        <table:table-row>
          <table:table-cell table:style-name="TCellB">
            <text:p text:style-name="Body">[net]</text:p>
          </table:table-cell>
          <table:table-cell table:style-name="TCellB">
            <text:p text:style-name="Body">encrypt</text:p>
          </table:table-cell>
          <table:table-cell table:style-name="TCellB">
            <text:p text:style-name="Body">true</text:p>
          </table:table-cell>
          <table:table-cell table:style-name="TCellB">
            <text:p text:style-name="Body">AES-128-GCM with PSK</text:p>
          </table:table-cell>
        </table:table-row>
        <table:table-row>
          <table:table-cell table:style-name="TCellB">
            <text:p text:style-name="Body">[net]</text:p>
          </table:table-cell>
          <table:table-cell table:style-name="TCellB">
            <text:p text:style-name="Body">password</text:p>
          </table:table-cell>
          <table:table-cell table:style-name="TCellB">
            <text:p text:style-name="Body"/>
          </table:table-cell>
          <table:table-cell table:style-name="TCellB">
            <text:p text:style-name="Body">PSK; both sides must match</text:p>
          </table:table-cell>
        </table:table-row>
        <table:table-row>
          <table:table-cell table:style-name="TCellB">
            <text:p text:style-name="Body">[audio]</text:p>
          </table:table-cell>
          <table:table-cell table:style-name="TCellB">
            <text:p text:style-name="Body">sample_rate_hz</text:p>
          </table:table-cell>
          <table:table-cell table:style-name="TCellB">
            <text:p text:style-name="Body">48000</text:p>
          </table:table-cell>
          <table:table-cell table:style-name="TCellB">
            <text:p text:style-name="Body">Opus expects 48 kHz internally</text:p>
          </table:table-cell>
        </table:table-row>
        <table:table-row>
          <table:table-cell table:style-name="TCellB">
            <text:p text:style-name="Body">[audio]</text:p>
          </table:table-cell>
          <table:table-cell table:style-name="TCellB">
            <text:p text:style-name="Body">frame_ms</text:p>
          </table:table-cell>
          <table:table-cell table:style-name="TCellB">
            <text:p text:style-name="Body">20</text:p>
          </table:table-cell>
          <table:table-cell table:style-name="TCellB">
            <text:p text:style-name="Body">Opus frame; 10/20/40 valid</text:p>
          </table:table-cell>
        </table:table-row>
        <table:table-row>
          <table:table-cell table:style-name="TCellB">
            <text:p text:style-name="Body">[audio]</text:p>
          </table:table-cell>
          <table:table-cell table:style-name="TCellB">
            <text:p text:style-name="Body">opus_bitrate_bps</text:p>
          </table:table-cell>
          <table:table-cell table:style-name="TCellB">
            <text:p text:style-name="Body">24000</text:p>
          </table:table-cell>
          <table:table-cell table:style-name="TCellB">
            <text:p text:style-name="Body">VoIP profile</text:p>
          </table:table-cell>
        </table:table-row>
        <table:table-row>
          <table:table-cell table:style-name="TCellB">
            <text:p text:style-name="Body">[audio]</text:p>
          </table:table-cell>
          <table:table-cell table:style-name="TCellB">
            <text:p text:style-name="Body">aec</text:p>
          </table:table-cell>
          <table:table-cell table:style-name="TCellB">
            <text:p text:style-name="Body">true</text:p>
          </table:table-cell>
          <table:table-cell table:style-name="TCellB">
            <text:p text:style-name="Body">FDAF + Wiener (mutually exclusive with dfn)</text:p>
          </table:table-cell>
        </table:table-row>
        <table:table-row>
          <table:table-cell table:style-name="TCellB">
            <text:p text:style-name="Body">[audio]</text:p>
          </table:table-cell>
          <table:table-cell table:style-name="TCellB">
            <text:p text:style-name="Body">dfn</text:p>
          </table:table-cell>
          <table:table-cell table:style-name="TCellB">
            <text:p text:style-name="Body">false</text:p>
          </table:table-cell>
          <table:table-cell table:style-name="TCellB">
            <text:p text:style-name="Body">DeepFilterNet3 AI mode</text:p>
          </table:table-cell>
        </table:table-row>
        <table:table-row>
          <table:table-cell table:style-name="TCellB">
            <text:p text:style-name="Body">[audio]</text:p>
          </table:table-cell>
          <table:table-cell table:style-name="TCellB">
            <text:p text:style-name="Body">vad</text:p>
          </table:table-cell>
          <table:table-cell table:style-name="TCellB">
            <text:p text:style-name="Body">true</text:p>
          </table:table-cell>
          <table:table-cell table:style-name="TCellB">
            <text:p text:style-name="Body">silence threshold</text:p>
          </table:table-cell>
        </table:table-row>
        <table:table-row>
          <table:table-cell table:style-name="TCellB">
            <text:p text:style-name="Body">[audio]</text:p>
          </table:table-cell>
          <table:table-cell table:style-name="TCellB">
            <text:p text:style-name="Body">rec_level</text:p>
          </table:table-cell>
          <table:table-cell table:style-name="TCellB">
            <text:p text:style-name="Body">1000</text:p>
          </table:table-cell>
          <table:table-cell table:style-name="TCellB">
            <text:p text:style-name="Body">mic gain (0..1000 -&gt; 0..1.0)</text:p>
          </table:table-cell>
        </table:table-row>
        <table:table-row>
          <table:table-cell table:style-name="TCellB">
            <text:p text:style-name="Body">[audio]</text:p>
          </table:table-cell>
          <table:table-cell table:style-name="TCellB">
            <text:p text:style-name="Body">play_volume</text:p>
          </table:table-cell>
          <table:table-cell table:style-name="TCellB">
            <text:p text:style-name="Body">1000</text:p>
          </table:table-cell>
          <table:table-cell table:style-name="TCellB">
            <text:p text:style-name="Body">spk gain (0..1000 -&gt; 0..1.0)</text:p>
          </table:table-cell>
        </table:table-row>
        <table:table-row>
          <table:table-cell table:style-name="TCellB">
            <text:p text:style-name="Body">[ui]</text:p>
          </table:table-cell>
          <table:table-cell table:style-name="TCellB">
            <text:p text:style-name="Body">minimize_to_tray</text:p>
          </table:table-cell>
          <table:table-cell table:style-name="TCellB">
            <text:p text:style-name="Body">false</text:p>
          </table:table-cell>
          <table:table-cell table:style-name="TCellB">
            <text:p text:style-name="Body">X / minimize hides to tray</text:p>
          </table:table-cell>
        </table:table-row>
        <table:table-row>
          <table:table-cell table:style-name="TCellB">
            <text:p text:style-name="Body">[ui]</text:p>
          </table:table-cell>
          <table:table-cell table:style-name="TCellB">
            <text:p text:style-name="Body">autostart</text:p>
          </table:table-cell>
          <table:table-cell table:style-name="TCellB">
            <text:p text:style-name="Body">false</text:p>
          </table:table-cell>
          <table:table-cell table:style-name="TCellB">
            <text:p text:style-name="Body">Windows-only registry Run entry</text:p>
          </table:table-cell>
        </table:table-row>
        <table:table-row>
          <table:table-cell table:style-name="TCellB">
            <text:p text:style-name="Body">[ui]</text:p>
          </table:table-cell>
          <table:table-cell table:style-name="TCellB">
            <text:p text:style-name="Body">generate_log</text:p>
          </table:table-cell>
          <table:table-cell table:style-name="TCellB">
            <text:p text:style-name="Body">false</text:p>
          </table:table-cell>
          <table:table-cell table:style-name="TCellB">
            <text:p text:style-name="Body">~/.picophone/picophone.log</text:p>
          </table:table-cell>
        </table:table-row>
      </table:table>
      <text:h text:outline-level="1" text:style-name="H1">5. Network protocol</text:h>
      <text:p text:style-name="Body">PicoPhone-Py uses a tiny custom protocol on a single UDP port (default 11676). The first byte of every datagram tells the dispatcher which lane the packet belongs to:</text:p>
      <table:table table:style-name="Tbl">
        <table:table-column table:style-name="col_3095878294832_3cm"/>
        <table:table-column table:style-name="col_3095878294832_4cm"/>
        <table:table-column table:style-name="col_3095878294832_10cm"/>
        <table:table-row>
          <table:table-cell table:style-name="TCellH">
            <text:p text:style-name="Body"><text:span text:style-name="Bold">First byte</text:span></text:p>
          </table:table-cell>
          <table:table-cell table:style-name="TCellH">
            <text:p text:style-name="Body"><text:span text:style-name="Bold">Lane</text:span></text:p>
          </table:table-cell>
          <table:table-cell table:style-name="TCellH">
            <text:p text:style-name="Body"><text:span text:style-name="Bold">Format</text:span></text:p>
          </table:table-cell>
        </table:table-row>
        <table:table-row>
          <table:table-cell table:style-name="TCellB">
            <text:p text:style-name="Body">0x7B  '{'</text:p>
          </table:table-cell>
          <table:table-cell table:style-name="TCellB">
            <text:p text:style-name="Body">Signaling</text:p>
          </table:table-cell>
          <table:table-cell table:style-name="TCellB">
            <text:p text:style-name="Body">JSON datagram</text:p>
          </table:table-cell>
        </table:table-row>
        <table:table-row>
          <table:table-cell table:style-name="TCellB">
            <text:p text:style-name="Body">0xEF</text:p>
          </table:table-cell>
          <table:table-cell table:style-name="TCellB">
            <text:p text:style-name="Body">Media</text:p>
          </table:table-cell>
          <table:table-cell table:style-name="TCellB">
            <text:p text:style-name="Body">RTP-like header (8 B) + AES-GCM payload</text:p>
          </table:table-cell>
        </table:table-row>
      </table:table>
      <text:h text:outline-level="2" text:style-name="H2">5.1 Signaling messages (JSON)</text:h>
      <table:table table:style-name="Tbl">
        <table:table-column table:style-name="col_3095878298288_2.5cm"/>
        <table:table-column table:style-name="col_3095878298288_4.5cm"/>
        <table:table-column table:style-name="col_3095878298288_10cm"/>
        <table:table-row>
          <table:table-cell table:style-name="TCellH">
            <text:p text:style-name="Body"><text:span text:style-name="Bold">t</text:span></text:p>
          </table:table-cell>
          <table:table-cell table:style-name="TCellH">
            <text:p text:style-name="Body"><text:span text:style-name="Bold">Direction</text:span></text:p>
          </table:table-cell>
          <table:table-cell table:style-name="TCellH">
            <text:p text:style-name="Body"><text:span text:style-name="Bold">Purpose</text:span></text:p>
          </table:table-cell>
        </table:table-row>
        <table:table-row>
          <table:table-cell table:style-name="TCellB">
            <text:p text:style-name="Body">INVITE</text:p>
          </table:table-cell>
          <table:table-cell table:style-name="TCellB">
            <text:p text:style-name="Body">caller -&gt; callee</text:p>
          </table:table-cell>
          <table:table-cell table:style-name="TCellB">
            <text:p text:style-name="Body">open a call, carries nonce_a</text:p>
          </table:table-cell>
        </table:table-row>
        <table:table-row>
          <table:table-cell table:style-name="TCellB">
            <text:p text:style-name="Body">ACCEPT</text:p>
          </table:table-cell>
          <table:table-cell table:style-name="TCellB">
            <text:p text:style-name="Body">callee -&gt; caller</text:p>
          </table:table-cell>
          <table:table-cell table:style-name="TCellB">
            <text:p text:style-name="Body">accept, carries nonce_b</text:p>
          </table:table-cell>
        </table:table-row>
        <table:table-row>
          <table:table-cell table:style-name="TCellB">
            <text:p text:style-name="Body">REJECT</text:p>
          </table:table-cell>
          <table:table-cell table:style-name="TCellB">
            <text:p text:style-name="Body">callee -&gt; caller</text:p>
          </table:table-cell>
          <table:table-cell table:style-name="TCellB">
            <text:p text:style-name="Body">decline with reason</text:p>
          </table:table-cell>
        </table:table-row>
        <table:table-row>
          <table:table-cell table:style-name="TCellB">
            <text:p text:style-name="Body">BYE</text:p>
          </table:table-cell>
          <table:table-cell table:style-name="TCellB">
            <text:p text:style-name="Body">either</text:p>
          </table:table-cell>
          <table:table-cell table:style-name="TCellB">
            <text:p text:style-name="Body">hang up / cancel</text:p>
          </table:table-cell>
        </table:table-row>
        <table:table-row>
          <table:table-cell table:style-name="TCellB">
            <text:p text:style-name="Body">PING</text:p>
          </table:table-cell>
          <table:table-cell table:style-name="TCellB">
            <text:p text:style-name="Body">either, every 3 s</text:p>
          </table:table-cell>
          <table:table-cell table:style-name="TCellB">
            <text:p text:style-name="Body">keepalive — auto-replied with PONG</text:p>
          </table:table-cell>
        </table:table-row>
        <table:table-row>
          <table:table-cell table:style-name="TCellB">
            <text:p text:style-name="Body">PONG</text:p>
          </table:table-cell>
          <table:table-cell table:style-name="TCellB">
            <text:p text:style-name="Body">either</text:p>
          </table:table-cell>
          <table:table-cell table:style-name="TCellB">
            <text:p text:style-name="Body">keepalive reply</text:p>
          </table:table-cell>
        </table:table-row>
        <table:table-row>
          <table:table-cell table:style-name="TCellB">
            <text:p text:style-name="Body">MSG</text:p>
          </table:table-cell>
          <table:table-cell table:style-name="TCellB">
            <text:p text:style-name="Body">either</text:p>
          </table:table-cell>
          <table:table-cell table:style-name="TCellB">
            <text:p text:style-name="Body">free-form chat text</text:p>
          </table:table-cell>
        </table:table-row>
      </table:table>
      <text:h text:outline-level="2" text:style-name="H2">5.2 Media packet</text:h>
      <text:p text:style-name="Code">+---------+---------+---------+---------+---------+<text:line-break/>|0xEF| flg|     seq |       timestamp     |  ssrc  |<text:line-break/>+---------+---------+---------+---------+---------+<text:line-break/>|         AES-128-GCM(opus_payload, aad=hdr)        |<text:line-break/>+--------------------------------------------------+<text:line-break/>  AAD = 8-byte header   nonce = 12 B prepended to ciphertext</text:p>
      <text:h text:outline-level="2" text:style-name="H2">5.3 Per-call key derivation</text:h>
      <text:p text:style-name="Body">On INVITE the caller sends a 16-byte random nonce_a. The callee replies with nonce_b in ACCEPT. Both sides then derive a 16-byte AES key:</text:p>
      <text:p text:style-name="Code">K = HKDF-SHA256(<text:line-break/>        ikm  = PSK,                       # net.password<text:line-break/>        salt = nonce_a || nonce_b,        # 32 bytes<text:line-break/>        info = b'picophone-media/v1',<text:line-break/>        length = 16)</text:p>
      <text:p text:style-name="Body">An empty PSK yields an empty key, in which case both sides skip AES-GCM entirely and exchange plaintext Opus. With matching PSKs each call has a unique key.</text:p>
      <text:h text:outline-level="1" text:style-name="H1">6. Echo cancellation</text:h>
      <text:h text:outline-level="2" text:style-name="H2">6.1 Classic AEC — FDAF</text:h>
      <text:p text:style-name="Body">When PREF -&gt; Audio -&gt; Classic AEC is on, picophone runs a frequency-domain adaptive filter (overlap-save NLMS):</text:p>
      <text:list>
        <text:list-item>
          <text:p text:style-name="Body">block size 960 samples (20 ms at 48 kHz), FFT size 1920</text:p>
        </text:list-item>
        <text:list-item>
          <text:p text:style-name="Body">filter adaptation in the frequency domain with diagonal-loaded power normalisation (avoids divide-by-zero on quiet bins, prevents narrowband explosion)</text:p>
        </text:list-item>
        <text:list-item>
          <text:p text:style-name="Body">Geigel double-talk detector (max|d| &gt; 1.5 * max|x|) freezes the filter during near-end speech</text:p>
        </text:list-item>
        <text:list-item>
          <text:p text:style-name="Body">Wiener post-filter: per-bin gain = 1 - |Y_hat|^2 / |D|^2, clipped to [0.02, 1.0] and IIR-smoothed; lets the speaker pass through during double-talk instead of crushing them</text:p>
        </text:list-item>
        <text:list-item>
          <text:p text:style-name="Body">synthetic test ERLE 2-3 s tail = 44.6 dB, near-end-only loss &lt; 1 dB, double-talk speaker correlation 0.97</text:p>
        </text:list-item>
      </text:list>
      <text:h text:outline-level="2" text:style-name="H2">6.2 AI mode — DeepFilterNet3</text:h>
      <text:p text:style-name="Body">PREF -&gt; Audio -&gt; AI mode swaps the entire AEC stage out for DeepFilterNet3, the same neural enhancer family used by Krisp / Microsoft Teams. The capture frame goes raw mic -&gt; DFN3 -&gt; Opus. AI mode is mutually exclusive with the classic AEC because both stages would otherwise fight over the same residual.</text:p>
      <text:p text:style-name="Body">DFN3 runs on CPU via PyTorch (~1.3 GB) at real-time-factor ~0.03 on a modern x86 desktop (Ryzen 7900X3D). Latency ~30 ms (one DFN frame).</text:p>
      <text:h text:outline-level="1" text:style-name="H1">7. Smoke tests</text:h>
      <text:p text:style-name="Body">All under scripts/, runnable as plain Python:</text:p>
      <table:table table:style-name="Tbl">
        <table:table-column table:style-name="col_3095878408944_6cm"/>
        <table:table-column table:style-name="col_3095878408944_11cm"/>
        <table:table-row>
          <table:table-cell table:style-name="TCellH">
            <text:p text:style-name="Body"><text:span text:style-name="Bold">Script</text:span></text:p>
          </table:table-cell>
          <table:table-cell table:style-name="TCellH">
            <text:p text:style-name="Body"><text:span text:style-name="Bold">What it covers</text:span></text:p>
          </table:table-cell>
        </table:table-row>
        <table:table-row>
          <table:table-cell table:style-name="TCellB">
            <text:p text:style-name="Body">smoke_keyx.py</text:p>
          </table:table-cell>
          <table:table-cell table:style-name="TCellB">
            <text:p text:style-name="Body">HKDF derivation, AES-GCM roundtrip, wrong-key reject</text:p>
          </table:table-cell>
        </table:table-row>
        <table:table-row>
          <table:table-cell table:style-name="TCellB">
            <text:p text:style-name="Body">smoke_signaling.py</text:p>
          </table:table-cell>
          <table:table-cell table:style-name="TCellB">
            <text:p text:style-name="Body">INVITE/ACCEPT/BYE roundtrip on ::1 with nonce exchange</text:p>
          </table:table-cell>
        </table:table-row>
        <table:table-row>
          <table:table-cell table:style-name="TCellB">
            <text:p text:style-name="Body">smoke_media.py</text:p>
          </table:table-cell>
          <table:table-cell table:style-name="TCellB">
            <text:p text:style-name="Body">50 RTP-like packets through MediaSession.feed/make_packet</text:p>
          </table:table-cell>
        </table:table-row>
        <table:table-row>
          <table:table-cell table:style-name="TCellB">
            <text:p text:style-name="Body">smoke_discovery.py</text:p>
          </table:table-cell>
          <table:table-cell table:style-name="TCellB">
            <text:p text:style-name="Body">Two pure-Python multicast peers find each other</text:p>
          </table:table-cell>
        </table:table-row>
        <table:table-row>
          <table:table-cell table:style-name="TCellB">
            <text:p text:style-name="Body">smoke_aec.py</text:p>
          </table:table-cell>
          <table:table-cell table:style-name="TCellB">
            <text:p text:style-name="Body">FDAF echo cancellation &gt;= 15 dB ERLE on synthetic echo</text:p>
          </table:table-cell>
        </table:table-row>
        <table:table-row>
          <table:table-cell table:style-name="TCellB">
            <text:p text:style-name="Body">smoke_aec_doubletalk.py</text:p>
          </table:table-cell>
          <table:table-cell table:style-name="TCellB">
            <text:p text:style-name="Body">Double-talk: near-end voice survives the post-filter</text:p>
          </table:table-cell>
        </table:table-row>
        <table:table-row>
          <table:table-cell table:style-name="TCellB">
            <text:p text:style-name="Body">smoke_chat.py</text:p>
          </table:table-cell>
          <table:table-cell table:style-name="TCellB">
            <text:p text:style-name="Body">MSG signaling roundtrip</text:p>
          </table:table-cell>
        </table:table-row>
        <table:table-row>
          <table:table-cell table:style-name="TCellB">
            <text:p text:style-name="Body">smoke_call_localhost.py</text:p>
          </table:table-cell>
          <table:table-cell table:style-name="TCellB">
            <text:p text:style-name="Body">Two CallControllers on ::1, full handshake + media</text:p>
          </table:table-cell>
        </table:table-row>
        <table:table-row>
          <table:table-cell table:style-name="TCellB">
            <text:p text:style-name="Body">smoke_engine_to_engine.py</text:p>
          </table:table-cell>
          <table:table-cell table:style-name="TCellB">
            <text:p text:style-name="Body">Multiplexed signaling+media end-to-end (synthetic engine)</text:p>
          </table:table-cell>
        </table:table-row>
        <table:table-row>
          <table:table-cell table:style-name="TCellB">
            <text:p text:style-name="Body">smoke_gui.py</text:p>
          </table:table-cell>
          <table:table-cell table:style-name="TCellB">
            <text:p text:style-name="Body">Headless Qt launch + clean teardown (offscreen)</text:p>
          </table:table-cell>
        </table:table-row>
      </table:table>
      <text:h text:outline-level="1" text:style-name="H1">8. Architecture</text:h>
      <text:p text:style-name="Code">+---------------------------------------------------+<text:line-break/>|                 MainWindow (Qt 6)                  |<text:line-break/>|  CALL/DISC/MSG/OFF/CHAT/LOG/CONF  +  PREF dialog   |<text:line-break/>+----+-----------------+----------------+-----+------+<text:line-break/>     |                 |                |     |<text:line-break/>     |  signals        |  Qt timer      |     |  user actions<text:line-break/>     v                 v                v     v<text:line-break/>+---------------------------------------------------+<text:line-break/>|             CallController (asyncio thread)        |<text:line-break/>|  state machine: idle/calling/ringing/in-call       |<text:line-break/>|  keepalive (PING/PONG)                             |<text:line-break/>+---------+----------------+---------------+---------+<text:line-break/>          |                |               |<text:line-break/>          v                v               v<text:line-break/>  SignalingServer    MediaSession    AudioEngine<text:line-break/>  (one UDP socket)   (RTP-like+GCM)  (PortAudio + Opus + AEC/DFN)</text:p>
      <text:h text:outline-level="1" text:style-name="H1">9. Version history (git log)</text:h>
      <table:table table:style-name="Tbl">
        <table:table-column table:style-name="col_3095875805520_1.8cm"/>
        <table:table-column table:style-name="col_3095875805520_2.2cm"/>
        <table:table-column table:style-name="col_3095875805520_13cm"/>
        <table:table-row>
          <table:table-cell table:style-name="TCellH">
            <text:p text:style-name="Body"><text:span text:style-name="Bold">Hash</text:span></text:p>
          </table:table-cell>
          <table:table-cell table:style-name="TCellH">
            <text:p text:style-name="Body"><text:span text:style-name="Bold">Date</text:span></text:p>
          </table:table-cell>
          <table:table-cell table:style-name="TCellH">
            <text:p text:style-name="Body"><text:span text:style-name="Bold">Subject</text:span></text:p>
          </table:table-cell>
        </table:table-row>
        <table:table-row>
          <table:table-cell table:style-name="TCellB">
            <text:p text:style-name="Body">e5ef7de</text:p>
          </table:table-cell>
          <table:table-cell table:style-name="TCellB">
            <text:p text:style-name="Body">2026-04-28</text:p>
          </table:table-cell>
          <table:table-cell table:style-name="TCellB">
            <text:p text:style-name="Body">Mageia v0.4.1+AI ELF (181 MB, slim torch via --nofollow-import-to)</text:p>
          </table:table-cell>
        </table:table-row>
        <table:table-row>
          <table:table-cell table:style-name="TCellB">
            <text:p text:style-name="Body">a1ae3c7</text:p>
          </table:table-cell>
          <table:table-cell table:style-name="TCellB">
            <text:p text:style-name="Body">2026-04-28</text:p>
          </table:table-cell>
          <table:table-cell table:style-name="TCellB">
            <text:p text:style-name="Body">build_mageia.sh: include picophone.autostart module</text:p>
          </table:table-cell>
        </table:table-row>
        <table:table-row>
          <table:table-cell table:style-name="TCellB">
            <text:p text:style-name="Body">23aa8f3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v0.4.1: minimize to system tray + Windows autostart</text:p>
          </table:table-cell>
        </table:table-row>
        <table:table-row>
          <table:table-cell table:style-name="TCellB">
            <text:p text:style-name="Body">24670b6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Fix dialog stacking crash + ring keepalive + don't open audio before ACCEPT</text:p>
          </table:table-cell>
        </table:table-row>
        <table:table-row>
          <table:table-cell table:style-name="TCellB">
            <text:p text:style-name="Body">2901a1d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v0.4.0: optional DeepFilterNet3 AI mode (Krisp/Skype-tier neural NS+dereverb)</text:p>
          </table:table-cell>
        </table:table-row>
        <table:table-row>
          <table:table-cell table:style-name="TCellB">
            <text:p text:style-name="Body">30c8135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AEC: Wiener post-filter + Geigel double-talk detector</text:p>
          </table:table-cell>
        </table:table-row>
        <table:table-row>
          <table:table-cell table:style-name="TCellB">
            <text:p text:style-name="Body">73da149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build_windows.bat: don't wipe Linux ELF in dist/nuitka/</text:p>
          </table:table-cell>
        </table:table-row>
        <table:table-row>
          <table:table-cell table:style-name="TCellB">
            <text:p text:style-name="Body">a750708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AEC: cap slider gains at 1.0 (no software amplification)</text:p>
          </table:table-cell>
        </table:table-row>
        <table:table-row>
          <table:table-cell table:style-name="TCellB">
            <text:p text:style-name="Body">829c007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Fix QSoundEffect.setLoopCount enum-&gt;int (Qt 6.11 strict)</text:p>
          </table:table-cell>
        </table:table-row>
        <table:table-row>
          <table:table-cell table:style-name="TCellB">
            <text:p text:style-name="Body">771e3af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v0.3.0: PicoPhone-style mute/sliders + ring + popup notifications + log toggle</text:p>
          </table:table-cell>
        </table:table-row>
        <table:table-row>
          <table:table-cell table:style-name="TCellB">
            <text:p text:style-name="Body">80e223c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Better UX when no audio device is present</text:p>
          </table:table-cell>
        </table:table-row>
        <table:table-row>
          <table:table-cell table:style-name="TCellB">
            <text:p text:style-name="Body">ec6eb8e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v0.2.0-mux: version banner in log + first-media-datagram diagnostic</text:p>
          </table:table-cell>
        </table:table-row>
        <table:table-row>
          <table:table-cell table:style-name="TCellB">
            <text:p text:style-name="Body">b5611f3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Multiplex signaling + media on one UDP port (single firewall hole) + PING/PONG keepalive</text:p>
          </table:table-cell>
        </table:table-row>
        <table:table-row>
          <table:table-cell table:style-name="TCellB">
            <text:p text:style-name="Body">f01c9d6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Live media TX/RX kbps in status bar + fix Windows --jobs detection</text:p>
          </table:table-cell>
        </table:table-row>
        <table:table-row>
          <table:table-cell table:style-name="TCellB">
            <text:p text:style-name="Body">856d85a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pyproject.toml: declare tomli runtime dep for Python&lt;3.11</text:p>
          </table:table-cell>
        </table:table-row>
        <table:table-row>
          <table:table-cell table:style-name="TCellB">
            <text:p text:style-name="Body">65759a4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build_mageia.sh: build on native ext4 via tar pipe + copy artifact back</text:p>
          </table:table-cell>
        </table:table-row>
        <table:table-row>
          <table:table-cell table:style-name="TCellB">
            <text:p text:style-name="Body">28b2518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Fix IPv4 literal target on dual-stack IPv6 socket (Windows getaddrinfo)</text:p>
          </table:table-cell>
        </table:table-row>
        <table:table-row>
          <table:table-cell table:style-name="TCellB">
            <text:p text:style-name="Body">0cb61fa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Use all CPU cores for compilation (--jobs in build scripts)</text:p>
          </table:table-cell>
        </table:table-row>
        <table:table-row>
          <table:table-cell table:style-name="TCellB">
            <text:p text:style-name="Body">882308e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Add Mageia Linux build (Nuitka onefile via urpmi/dnf or Docker)</text:p>
          </table:table-cell>
        </table:table-row>
        <table:table-row>
          <table:table-cell table:style-name="TCellB">
            <text:p text:style-name="Body">711abec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Pure-Python LAN discovery + original PicoPhone icon in single-file exe</text:p>
          </table:table-cell>
        </table:table-row>
        <table:table-row>
          <table:table-cell table:style-name="TCellB">
            <text:p text:style-name="Body">75db0b0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True single-file Windows exe via Nuitka (replaces cx_Freeze + SFX)</text:p>
          </table:table-cell>
        </table:table-row>
        <table:table-row>
          <table:table-cell table:style-name="TCellB">
            <text:p text:style-name="Body">007395e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Single-file portable Windows exe via cx_Freeze + Qt prune + 7-Zip SFX</text:p>
          </table:table-cell>
        </table:table-row>
        <table:table-row>
          <table:table-cell table:style-name="TCellB">
            <text:p text:style-name="Body">e59608d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Switch Windows installer from portable Python (.bat) to cx_Freeze (single .exe)</text:p>
          </table:table-cell>
        </table:table-row>
        <table:table-row>
          <table:table-cell table:style-name="TCellB">
            <text:p text:style-name="Body">151506f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Switch Windows installer from PyInstaller to portable Python</text:p>
          </table:table-cell>
        </table:table-row>
        <table:table-row>
          <table:table-cell table:style-name="TCellB">
            <text:p text:style-name="Body">2005a04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Switch Windows installer to PyInstaller --onedir + AV workaround docs</text:p>
          </table:table-cell>
        </table:table-row>
        <table:table-row>
          <table:table-cell table:style-name="TCellB">
            <text:p text:style-name="Body">371c1fa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Add chat, preferences dialog, and Windows/Linux installers</text:p>
          </table:table-cell>
        </table:table-row>
        <table:table-row>
          <table:table-cell table:style-name="TCellB">
            <text:p text:style-name="Body">4ec1cfc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Add NumPy FDAF echo canceller + Linux compatibility</text:p>
          </table:table-cell>
        </table:table-row>
        <table:table-row>
          <table:table-cell table:style-name="TCellB">
            <text:p text:style-name="Body">bfb0f58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Ignore smoke-test artifact picophone-smoke.toml</text:p>
          </table:table-cell>
        </table:table-row>
        <table:table-row>
          <table:table-cell table:style-name="TCellB">
            <text:p text:style-name="Body">918f1e4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Import PicoPhone-Py skeleton + MVP</text:p>
          </table:table-cell>
        </table:table-row>
        <table:table-row>
          <table:table-cell table:style-name="TCellB">
            <text:p text:style-name="Body">4faf342</text:p>
          </table:table-cell>
          <table:table-cell table:style-name="TCellB">
            <text:p text:style-name="Body">2026-04-27</text:p>
          </table:table-cell>
          <table:table-cell table:style-name="TCellB">
            <text:p text:style-name="Body">init repo</text:p>
          </table:table-cell>
        </table:table-row>
      </table:table>
      <text:h text:outline-level="1" text:style-name="H1">10. Credits</text:h>
      <text:list>
        <text:list-item>
          <text:p text:style-name="Body">Original PicoPhone 1.65 — Javier Aldazabal, 2009 (vitez.it/picophone)</text:p>
        </text:list-item>
        <text:list-item>
          <text:p text:style-name="Body">Opus codec — Xiph.Org / IETF</text:p>
        </text:list-item>
        <text:list-item>
          <text:p text:style-name="Body">DeepFilterNet3 — Hendrik Schroeter et al. (Rikorose/DeepFilterNet)</text:p>
        </text:list-item>
        <text:list-item>
          <text:p text:style-name="Body">Qt 6 / PySide6 — The Qt Company</text:p>
        </text:list-item>
        <text:list-item>
          <text:p text:style-name="Body">PortAudio (sounddevice) — Ross Bencina, Phil Burk</text:p>
        </text:list-item>
        <text:list-item>
          <text:p text:style-name="Body">Nuitka — Kay Hay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table="urn:oasis:names:tc:opendocument:xmlns:table:1.0" xmlns:manifest="urn:oasis:names:tc:opendocument:xmlns:manifest:1.0" office:version="1.2">
  <office:font-face-decls>
    <style:font-face style:name="Sans" svg:font-family="Liberation Sans"/>
    <style:font-face style:name="Mono" svg:font-family="Liberation Mono" style:font-pitch="fixed"/>
  </office:font-face-decls>
  <office:styles>
    <style:style style:name="Title" style:family="paragraph" style:display-name="Title">
      <style:paragraph-properties fo:margin-top="0cm" fo:margin-bottom="0.6cm" fo:text-align="center"/>
      <style:text-properties fo:font-size="22pt" fo:font-weight="bold" fo:font-family="Sans"/>
    </style:style>
    <style:style style:name="H1" style:family="paragraph" style:display-name="H1">
      <style:paragraph-properties fo:margin-top="0.8cm" fo:margin-bottom="0.3cm" fo:break-before="page"/>
      <style:text-properties fo:font-size="16pt" fo:font-weight="bold" fo:font-family="Sans"/>
    </style:style>
    <style:style style:name="H1NoPB" style:family="paragraph" style:display-name="H1NoPB">
      <style:paragraph-properties fo:margin-top="0.8cm" fo:margin-bottom="0.3cm"/>
      <style:text-properties fo:font-size="16pt" fo:font-weight="bold" fo:font-family="Sans"/>
    </style:style>
    <style:style style:name="H2" style:family="paragraph" style:display-name="H2">
      <style:paragraph-properties fo:margin-top="0.5cm" fo:margin-bottom="0.2cm"/>
      <style:text-properties fo:font-size="13pt" fo:font-weight="bold" fo:font-family="Sans"/>
    </style:style>
    <style:style style:name="H3" style:family="paragraph" style:display-name="H3">
      <style:paragraph-properties fo:margin-top="0.3cm" fo:margin-bottom="0.15cm"/>
      <style:text-properties fo:font-size="11pt" fo:font-weight="bold" fo:font-family="Sans"/>
    </style:style>
    <style:style style:name="Body" style:family="paragraph" style:display-name="Body">
      <style:paragraph-properties fo:margin-bottom="0.2cm"/>
      <style:text-properties fo:font-size="11pt" fo:font-family="Sans"/>
    </style:style>
    <style:style style:name="Code" style:family="paragraph" style:display-name="Code">
      <style:paragraph-properties fo:margin-top="0.1cm" fo:margin-bottom="0.2cm"/>
      <style:text-properties fo:font-size="9.5pt" fo:font-family="Mono"/>
    </style:style>
    <style:style style:name="CodeSpan" style:family="text" style:display-name="CodeSpan">
      <style:text-properties fo:font-size="10pt" fo:font-family="Mono"/>
    </style:style>
    <style:style style:name="Bold" style:family="text" style:display-name="Bold">
      <style:text-properties fo:font-weight="bold"/>
    </style:style>
    <style:style style:name="Muted" style:family="text" style:display-name="Muted">
      <style:text-properties fo:color="#666666" fo:font-size="9.5pt"/>
    </style:style>
    <style:style style:name="CenterMuted" style:family="paragraph" style:display-name="CenterMuted">
      <style:paragraph-properties fo:text-align="center" fo:margin-bottom="0.4cm"/>
      <style:text-properties fo:font-family="Sans" fo:font-size="10pt" fo:color="#666666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